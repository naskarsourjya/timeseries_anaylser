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" office:value-type="float" office:value="0.911258746735291" calcext:value-type="float">
            <text:p>0.9112587467352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" office:value-type="float" office:value="0.493791291459133" calcext:value-type="float">
            <text:p>0.4937912914591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()" office:value-type="float" office:value="0.818395621286755" calcext:value-type="float">
            <text:p>0.8183956212867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()" office:value-type="float" office:value="0.830832810159564" calcext:value-type="float">
            <text:p>0.8308328101595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()" office:value-type="float" office:value="0.994941779241346" calcext:value-type="float">
            <text:p>0.9949417792413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()" office:value-type="float" office:value="0.389014295796622" calcext:value-type="float">
            <text:p>0.3890142957966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()" office:value-type="float" office:value="0.893650066288625" calcext:value-type="float">
            <text:p>0.8936500662886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()" office:value-type="float" office:value="0.0513238014621711" calcext:value-type="float">
            <text:p>0.05132380146217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()" office:value-type="float" office:value="0.609219510789808" calcext:value-type="float">
            <text:p>0.60921951078980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()" office:value-type="float" office:value="0.594777613589705" calcext:value-type="float">
            <text:p>0.5947776135897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xk-1</text:p>
          </table:table-cell>
          <table:table-cell office:value-type="string" calcext:value-type="string">
            <text:p>Xk+1</text:p>
          </table:table-cell>
          <table:table-cell office:value-type="string" calcext:value-type="string">
            <text:p>Xk+2</text:p>
          </table:table-cell>
          <table:table-cell office:value-type="string" calcext:value-type="string">
            <text:p>xk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  <table:table-cell table:formula="of:=[.B4]" office:value-type="float" office:value="0.911258746735291" calcext:value-type="float">
            <text:p>0.91125874673529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/>
          <table:table-cell table:formula="of:=[.B4]" office:value-type="float" office:value="0.911258746735291" calcext:value-type="float">
            <text:p>0.911258746735291</text:p>
          </table:table-cell>
          <table:table-cell table:formula="of:=[.B5]" office:value-type="float" office:value="0.493791291459133" calcext:value-type="float">
            <text:p>0.493791291459133</text:p>
          </table:table-cell>
          <table:table-cell table:number-columns-repeated="2"/>
        </table:table-row>
        <table:table-row table:style-name="ro1">
          <table:table-cell table:formula="of:=[.A4]" office:value-type="float" office:value="0" calcext:value-type="float">
            <text:p>0</text:p>
          </table:table-cell>
          <table:table-cell table:formula="of:=[.B4]" office:value-type="float" office:value="0.911258746735291" calcext:value-type="float">
            <text:p>0.911258746735291</text:p>
          </table:table-cell>
          <table:table-cell/>
          <table:table-cell table:formula="of:=[.B5]" office:value-type="float" office:value="0.493791291459133" calcext:value-type="float">
            <text:p>0.493791291459133</text:p>
          </table:table-cell>
          <table:table-cell table:formula="of:=[.B6]" office:value-type="float" office:value="0.818395621286755" calcext:value-type="float">
            <text:p>0.818395621286755</text:p>
          </table:table-cell>
          <table:table-cell table:number-columns-repeated="2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0.493791291459133" calcext:value-type="float">
            <text:p>0.493791291459133</text:p>
          </table:table-cell>
          <table:table-cell table:formula="of:=[.B4]" office:value-type="float" office:value="0.911258746735291" calcext:value-type="float">
            <text:p>0.911258746735291</text:p>
          </table:table-cell>
          <table:table-cell table:formula="of:=[.B6]" office:value-type="float" office:value="0.818395621286755" calcext:value-type="float">
            <text:p>0.818395621286755</text:p>
          </table:table-cell>
          <table:table-cell table:formula="of:=[.B7]" office:value-type="float" office:value="0.830832810159564" calcext:value-type="float">
            <text:p>0.830832810159564</text:p>
          </table:table-cell>
          <table:table-cell table:number-columns-repeated="2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" office:value-type="float" office:value="0.818395621286755" calcext:value-type="float">
            <text:p>0.818395621286755</text:p>
          </table:table-cell>
          <table:table-cell table:formula="of:=[.B5]" office:value-type="float" office:value="0.493791291459133" calcext:value-type="float">
            <text:p>0.493791291459133</text:p>
          </table:table-cell>
          <table:table-cell table:formula="of:=[.B7]" office:value-type="float" office:value="0.830832810159564" calcext:value-type="float">
            <text:p>0.830832810159564</text:p>
          </table:table-cell>
          <table:table-cell table:formula="of:=[.B8]" office:value-type="float" office:value="0.994941779241346" calcext:value-type="float">
            <text:p>0.994941779241346</text:p>
          </table:table-cell>
          <table:table-cell table:formula="of:=[.B4]" office:value-type="float" office:value="0.911258746735291" calcext:value-type="float">
            <text:p>0.911258746735291</text:p>
          </table:table-cell>
          <table:table-cell/>
        </table:table-row>
        <table:table-row table:style-name="ro1">
          <table:table-cell table:formula="of:=[.A7]" office:value-type="float" office:value="3" calcext:value-type="float">
            <text:p>3</text:p>
          </table:table-cell>
          <table:table-cell table:formula="of:=[.B7]" office:value-type="float" office:value="0.830832810159564" calcext:value-type="float">
            <text:p>0.830832810159564</text:p>
          </table:table-cell>
          <table:table-cell table:formula="of:=[.B6]" office:value-type="float" office:value="0.818395621286755" calcext:value-type="float">
            <text:p>0.818395621286755</text:p>
          </table:table-cell>
          <table:table-cell table:formula="of:=[.B8]" office:value-type="float" office:value="0.994941779241346" calcext:value-type="float">
            <text:p>0.994941779241346</text:p>
          </table:table-cell>
          <table:table-cell table:formula="of:=[.B9]" office:value-type="float" office:value="0.389014295796622" calcext:value-type="float">
            <text:p>0.389014295796622</text:p>
          </table:table-cell>
          <table:table-cell table:formula="of:=[.B5]" office:value-type="float" office:value="0.493791291459133" calcext:value-type="float">
            <text:p>0.493791291459133</text:p>
          </table:table-cell>
          <table:table-cell/>
        </table:table-row>
        <table:table-row table:style-name="ro1">
          <table:table-cell table:formula="of:=[.A8]" office:value-type="float" office:value="4" calcext:value-type="float">
            <text:p>4</text:p>
          </table:table-cell>
          <table:table-cell table:formula="of:=[.B8]" office:value-type="float" office:value="0.994941779241346" calcext:value-type="float">
            <text:p>0.994941779241346</text:p>
          </table:table-cell>
          <table:table-cell table:formula="of:=[.B7]" office:value-type="float" office:value="0.830832810159564" calcext:value-type="float">
            <text:p>0.830832810159564</text:p>
          </table:table-cell>
          <table:table-cell table:formula="of:=[.B9]" office:value-type="float" office:value="0.389014295796622" calcext:value-type="float">
            <text:p>0.389014295796622</text:p>
          </table:table-cell>
          <table:table-cell table:formula="of:=[.B10]" office:value-type="float" office:value="0.893650066288625" calcext:value-type="float">
            <text:p>0.893650066288625</text:p>
          </table:table-cell>
          <table:table-cell table:formula="of:=[.B6]" office:value-type="float" office:value="0.818395621286755" calcext:value-type="float">
            <text:p>0.818395621286755</text:p>
          </table:table-cell>
          <table:table-cell/>
        </table:table-row>
        <table:table-row table:style-name="ro1">
          <table:table-cell table:formula="of:=[.A9]" office:value-type="float" office:value="5" calcext:value-type="float">
            <text:p>5</text:p>
          </table:table-cell>
          <table:table-cell table:formula="of:=[.B9]" office:value-type="float" office:value="0.389014295796622" calcext:value-type="float">
            <text:p>0.389014295796622</text:p>
          </table:table-cell>
          <table:table-cell table:formula="of:=[.B8]" office:value-type="float" office:value="0.994941779241346" calcext:value-type="float">
            <text:p>0.994941779241346</text:p>
          </table:table-cell>
          <table:table-cell table:formula="of:=[.B10]" office:value-type="float" office:value="0.893650066288625" calcext:value-type="float">
            <text:p>0.893650066288625</text:p>
          </table:table-cell>
          <table:table-cell table:formula="of:=[.B11]" office:value-type="float" office:value="0.0513238014621711" calcext:value-type="float">
            <text:p>0.0513238014621711</text:p>
          </table:table-cell>
          <table:table-cell table:formula="of:=[.B7]" office:value-type="float" office:value="0.830832810159564" calcext:value-type="float">
            <text:p>0.830832810159564</text:p>
          </table:table-cell>
          <table:table-cell/>
        </table:table-row>
        <table:table-row table:style-name="ro1">
          <table:table-cell table:formula="of:=[.A10]" office:value-type="float" office:value="6" calcext:value-type="float">
            <text:p>6</text:p>
          </table:table-cell>
          <table:table-cell table:formula="of:=[.B10]" office:value-type="float" office:value="0.893650066288625" calcext:value-type="float">
            <text:p>0.893650066288625</text:p>
          </table:table-cell>
          <table:table-cell table:formula="of:=[.B9]" office:value-type="float" office:value="0.389014295796622" calcext:value-type="float">
            <text:p>0.389014295796622</text:p>
          </table:table-cell>
          <table:table-cell table:formula="of:=[.B11]" office:value-type="float" office:value="0.0513238014621711" calcext:value-type="float">
            <text:p>0.0513238014621711</text:p>
          </table:table-cell>
          <table:table-cell table:formula="of:=[.B12]" office:value-type="float" office:value="0.609219510789808" calcext:value-type="float">
            <text:p>0.609219510789808</text:p>
          </table:table-cell>
          <table:table-cell table:formula="of:=[.B8]" office:value-type="float" office:value="0.994941779241346" calcext:value-type="float">
            <text:p>0.994941779241346</text:p>
          </table:table-cell>
          <table:table-cell/>
        </table:table-row>
        <table:table-row table:style-name="ro1">
          <table:table-cell table:formula="of:=[.A11]" office:value-type="float" office:value="7" calcext:value-type="float">
            <text:p>7</text:p>
          </table:table-cell>
          <table:table-cell table:formula="of:=[.B11]" office:value-type="float" office:value="0.0513238014621711" calcext:value-type="float">
            <text:p>0.0513238014621711</text:p>
          </table:table-cell>
          <table:table-cell table:formula="of:=[.B10]" office:value-type="float" office:value="0.893650066288625" calcext:value-type="float">
            <text:p>0.893650066288625</text:p>
          </table:table-cell>
          <table:table-cell table:formula="of:=[.B12]" office:value-type="float" office:value="0.609219510789808" calcext:value-type="float">
            <text:p>0.609219510789808</text:p>
          </table:table-cell>
          <table:table-cell table:formula="of:=[.B13]" office:value-type="float" office:value="0.594777613589705" calcext:value-type="float">
            <text:p>0.594777613589705</text:p>
          </table:table-cell>
          <table:table-cell table:formula="of:=[.B9]" office:value-type="float" office:value="0.389014295796622" calcext:value-type="float">
            <text:p>0.389014295796622</text:p>
          </table:table-cell>
          <table:table-cell/>
        </table:table-row>
        <table:table-row table:style-name="ro1">
          <table:table-cell table:formula="of:=[.A12]" office:value-type="float" office:value="8" calcext:value-type="float">
            <text:p>8</text:p>
          </table:table-cell>
          <table:table-cell table:formula="of:=[.B12]" office:value-type="float" office:value="0.609219510789808" calcext:value-type="float">
            <text:p>0.609219510789808</text:p>
          </table:table-cell>
          <table:table-cell table:formula="of:=[.B11]" office:value-type="float" office:value="0.0513238014621711" calcext:value-type="float">
            <text:p>0.0513238014621711</text:p>
          </table:table-cell>
          <table:table-cell table:formula="of:=[.B13]" office:value-type="float" office:value="0.594777613589705" calcext:value-type="float">
            <text:p>0.594777613589705</text:p>
          </table:table-cell>
          <table:table-cell/>
          <table:table-cell table:formula="of:=[.B10]" office:value-type="float" office:value="0.893650066288625" calcext:value-type="float">
            <text:p>0.893650066288625</text:p>
          </table:table-cell>
          <table:table-cell/>
        </table:table-row>
        <table:table-row table:style-name="ro1">
          <table:table-cell table:formula="of:=[.A13]" office:value-type="float" office:value="9" calcext:value-type="float">
            <text:p>9</text:p>
          </table:table-cell>
          <table:table-cell table:formula="of:=[.B13]" office:value-type="float" office:value="0.594777613589705" calcext:value-type="float">
            <text:p>0.594777613589705</text:p>
          </table:table-cell>
          <table:table-cell table:formula="of:=[.B12]" office:value-type="float" office:value="0.609219510789808" calcext:value-type="float">
            <text:p>0.609219510789808</text:p>
          </table:table-cell>
          <table:table-cell table:number-columns-repeated="2"/>
          <table:table-cell table:formula="of:=[.B11]" office:value-type="float" office:value="0.0513238014621711" calcext:value-type="float">
            <text:p>0.05132380146217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B13]" office:value-type="float" office:value="0.594777613589705" calcext:value-type="float">
            <text:p>0.594777613589705</text:p>
          </table:table-cell>
          <table:table-cell table:number-columns-repeated="2"/>
          <table:table-cell table:formula="of:=[.B12]" office:value-type="float" office:value="0.609219510789808" calcext:value-type="float">
            <text:p>0.6092195107898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formula="of:=[.B13]" office:value-type="float" office:value="0.594777613589705" calcext:value-type="float">
            <text:p>0.5947776135897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7:45:39.50536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11:23:01.920720000</meta:creation-date>
    <dc:date>2026-07-19T11:54:41.114722000</dc:date>
    <meta:editing-duration>PT34S</meta:editing-duration>
    <meta:editing-cycles>1</meta:editing-cycles>
    <meta:generator>LibreOffice/26.2.4.2$MacOSX_AARCH64 LibreOffice_project/0229ac93fcf0d7cbc6376066c6f35021cef002dc</meta:generator>
    <meta:document-statistic meta:table-count="1" meta:cell-count="93" meta:object-count="0"/>
  </office:meta>
</office:document-meta>
</file>